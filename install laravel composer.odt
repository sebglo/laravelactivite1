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2f0d" officeooo:paragraph-rsid="001a2f0d"/>
    </style:style>
    <style:style style:name="P2" style:family="paragraph" style:parent-style-name="Standard">
      <style:text-properties officeooo:rsid="001a2f0d" officeooo:paragraph-rsid="001a2f0d"/>
    </style:style>
    <style:style style:name="P3" style:family="paragraph" style:parent-style-name="Standard">
      <style:text-properties officeooo:rsid="001be4a3" officeooo:paragraph-rsid="001be4a3"/>
    </style:style>
    <style:style style:name="P4" style:family="paragraph" style:parent-style-name="Standard">
      <style:text-properties fo:color="#21409a" officeooo:rsid="001a2f0d" officeooo:paragraph-rsid="001a2f0d"/>
    </style:style>
    <style:style style:name="P5" style:family="paragraph" style:parent-style-name="Standard">
      <style:text-properties fo:color="#000000" officeooo:rsid="001be4a3" officeooo:paragraph-rsid="001be4a3"/>
    </style:style>
    <style:style style:name="P6" style:family="paragraph" style:parent-style-name="Standard">
      <style:text-properties officeooo:rsid="001f933b" officeooo:paragraph-rsid="001f933b"/>
    </style:style>
    <style:style style:name="T1" style:family="text">
      <style:text-properties officeooo:rsid="001be4a3"/>
    </style:style>
    <style:style style:name="T2" style:family="text">
      <style:text-properties fo:color="#21409a" style:font-name="Liberation Serif" fo:font-size="12pt" fo:letter-spacing="normal" fo:font-style="italic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composer <text:span text:style-name="T1">et laravel</text:span></text:p>
      <text:p text:style-name="P2"/>
      <text:p text:style-name="P6">manip que j’ai fait pour installer composer (a trier):</text:p>
      <text:p text:style-name="P2"/>
      <text:p text:style-name="P4">sudo apt-get install curl</text:p>
      <text:p text:style-name="P4"/>
      <text:p text:style-name="P4">curl -sS https://getcomposer.org/installer | php</text:p>
      <text:p text:style-name="P4"/>
      <text:p text:style-name="P4">apt-get install composer</text:p>
      <text:p text:style-name="P4"/>
      <text:p text:style-name="P4"><text:s/>sudo apt-get install composer</text:p>
      <text:p text:style-name="P4"/>
      <text:p text:style-name="P4">php -r "if (hash_file ('sha384', 'composer-setup.php') === 'e0012edf3e80b6978849f5eff0d4b4e4c79ff1609dd1e613307e16318854d24ae64f26d17af3ef0bf7cfb710ca' '' ''; '' Installer '; php ');} echo PHP_EOL; "</text:p>
      <text:p text:style-name="P4"/>
      <text:p text:style-name="P4">php composer-setup.php</text:p>
      <text:p text:style-name="P4"/>
      <text:p text:style-name="P4">sudo apt-get install php7.2</text:p>
      <text:p text:style-name="P4"/>
      <text:p text:style-name="P4">sudo apt-get install curl php-cli php-mbstring git unzip</text:p>
      <text:p text:style-name="P4"/>
      <text:p text:style-name="P4">curl -sS https://getcomposer.org/installer -o composer-setup.php</text:p>
      <text:p text:style-name="P4"/>
      <text:p text:style-name="P4">sudo php composer-setup.php --install-dir=/usr/local/bin –filename=composer</text:p>
      <text:p text:style-name="P4"/>
      <text:p text:style-name="P4">sudo apt install wget php-cli php-zip unzip</text:p>
      <text:p text:style-name="P4"/>
      <text:p text:style-name="P4">sudo php composer-setup.php --install-dir=/usr/local/bin –filename=composer</text:p>
      <text:p text:style-name="P4"/>
      <text:p text:style-name="P4">sudo php composer-setup.php --install-dir=/usr/local/bin –filename=composer</text:p>
      <text:p text:style-name="P2"/>
      <text:p text:style-name="P2"/>
      <text:p text:style-name="P2"/>
      <text:p text:style-name="P3">sur le systeme installer les paquet suivant:</text:p>
      <text:p text:style-name="P2"/>
      <text:p text:style-name="P1"><text:span text:style-name="Source_20_Text"><text:span text:style-name="T2">sudo apt-get install apache2 libapache2-mod-php7.2 php7.2 php7.2-xml php7.2-gd php7.2-opcache php7.2-mbstring</text:span></text:span></text:p>
      <text:p text:style-name="P2"/>
      <text:p text:style-name="P2"/>
      <text:p text:style-name="P3">installer la base de donnee sqlite:</text:p>
      <text:p text:style-name="P3"/>
      <text:p text:style-name="P4"><text:span text:style-name="T1">sudo </text:span>apt-get install php-sqlite3</text:p>
      <text:p text:style-name="P4"/>
      <text:p text:style-name="P5">instaler laravel avec une creation de dossier blog avec tous les fichiers laravel:</text:p>
      <text:p text:style-name="P5"/>
      <text:p text:style-name="P5">composer create-project --prefer-dist laravel/laravel blog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0:41:45.582315350</meta:creation-date>
    <dc:date>2020-03-13T11:02:12.277854630</dc:date>
    <meta:editing-duration>PT10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37" meta:character-count="1209" meta:non-whitespace-character-count="1096"/>
  </office:meta>
</office:document-meta>
</file>